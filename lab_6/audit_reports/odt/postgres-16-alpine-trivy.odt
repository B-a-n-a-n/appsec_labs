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Docker Audit Report: postgres-16-alpine-trivy.json</text:p>
      <text:p>
Target: postgres:16-alpine (alpine 3.23.4)</text:p>
      <text:p>
Target: usr/local/bin/gosu</text:p>
      <text:p>  [1] CVE-2025-68121 (CRITICAL): crypto/tls: crypto/tls: Incorrect certificate validation during TLS session resumption</text:p>
      <text:p>  [2] CVE-2025-58183 (HIGH): golang: archive/tar: Unbounded allocation when parsing GNU sparse map</text:p>
      <text:p>  [3] CVE-2025-61726 (HIGH): golang: net/url: Memory exhaustion in query parameter parsing in net/url</text:p>
      <text:p>  [4] CVE-2025-61728 (HIGH): golang: archive/zip: Excessive CPU consumption when building archive index in archive/zip</text:p>
      <text:p>  [5] CVE-2025-61729 (HIGH): crypto/x509: golang: Denial of Service due to excessive resource consumption via crafted certificate</text:p>
      <text:p>  [6] CVE-2026-25679 (HIGH): net/url: Incorrect parsing of IPv6 host literals in net/url</text:p>
      <text:p>  [7] CVE-2026-32280 (HIGH): crypto/x509: crypto/tls: golang: Go: Denial of Service vulnerability in certificate chain building</text:p>
      <text:p>  [8] CVE-2026-32281 (HIGH): crypto/x509: golang: Go crypto/x509: Denial of Service via inefficient certificate chain validation</text:p>
      <text:p>  [9] CVE-2026-32283 (HIGH): If one side of the TLS connection sends multiple key update messages p ...</text:p>
      <text:p>  [10] CVE-2025-47912 (MEDIUM): net/url: Insufficient validation of bracketed IPv6 hostnames in net/url</text:p>
      <text:p>  [11] CVE-2025-58185 (MEDIUM): encoding/asn1: Parsing DER payload can cause memory exhaustion in encoding/asn1</text:p>
      <text:p>  [12] CVE-2025-58186 (MEDIUM): golang.org/net/http: Lack of limit when parsing cookies can cause memory exhaustion in net/http</text:p>
      <text:p>  [13] CVE-2025-58187 (MEDIUM): crypto/x509: Quadratic complexity when checking name constraints in crypto/x509</text:p>
      <text:p>  [14] CVE-2025-58188 (MEDIUM): crypto/x509: golang: Panic when validating certificates with DSA public keys in crypto/x509</text:p>
      <text:p>  [15] CVE-2025-58189 (MEDIUM): crypto/tls: go crypto/tls ALPN negotiation error contains attacker controlled information</text:p>
      <text:p>  [16] CVE-2025-61723 (MEDIUM): encoding/pem: Quadratic complexity when parsing some invalid inputs in encoding/pem</text:p>
      <text:p>  [17] CVE-2025-61724 (MEDIUM): net/textproto: Excessive CPU consumption in Reader.ReadResponse in net/textproto</text:p>
      <text:p>  [18] CVE-2025-61725 (MEDIUM): net/mail: Excessive CPU consumption in ParseAddress in net/mail</text:p>
      <text:p>  [19] CVE-2025-61727 (MEDIUM): golang: crypto/x509: excluded subdomain constraint does not restrict wildcard SANs</text:p>
      <text:p>  [20] CVE-2025-61730 (MEDIUM): During the TLS 1.3 handshake if multiple messages are sent in records  ...</text:p>
      <text:p>  [21] CVE-2026-27142 (MEDIUM): html/template: URLs in meta content attribute actions are not escaped in html/template</text:p>
      <text:p>  [22] CVE-2026-32282 (MEDIUM): golang: internal/syscall/unix: Root.Chmod can follow symlinks out of the root</text:p>
      <text:p>  [23] CVE-2026-32288 (MEDIUM): archive/tar: golang: Go's archive/tar package: Denial of Service via maliciously-crafted archive</text:p>
      <text:p>  [24] CVE-2026-32289 (MEDIUM): html/template: golang: html/template: Cross-Site Scripting (XSS) via improper context and brace depth tracking in JS template literals</text:p>
      <text:p>  [25] CVE-2026-27139 (LOW): os: FileInfo can escape from a Root in golang os module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
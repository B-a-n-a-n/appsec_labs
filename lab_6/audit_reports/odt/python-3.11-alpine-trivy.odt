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python-3.11-alpine-trivy.json</text:p>
      <text:p>
Target: python:3.11-alpine (alpine 3.23.4)</text:p>
      <text:p>
Target: Python</text:p>
      <text:p>  [1] CVE-2026-23949 (HIGH): jaraco.context: jaraco.context: Path traversal via malicious tar archives</text:p>
      <text:p>  [2] CVE-2025-8869 (MEDIUM): pip: pip missing checks on symbolic link extraction</text:p>
      <text:p>  [3] CVE-2026-3219 (MEDIUM): pip: pip: Incorrect file installation due to improper archive handling</text:p>
      <text:p>  [4] CVE-2026-1703 (LOW): pip: pip: Information disclosure via path traversal when installing crafted wheel archives</text:p>
      <text:p>  [5] CVE-2026-24049 (HIGH): wheel: wheel: Privilege Escalation or Arbitrary Code Execution via malicious wheel file unpacking</text:p>
      <text:p>  [6] CVE-2026-24049 (HIGH): wheel: wheel: Privilege Escalation or Arbitrary Code Execution via malicious wheel file unpacking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
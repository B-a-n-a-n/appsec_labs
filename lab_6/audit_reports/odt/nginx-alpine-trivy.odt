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table="urn:oasis:names:tc:opendocument:xmlns:table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table="urn:oasis:names:tc:opendocument:xmlns:table:1.0" office:version="1.2">
  <office:automatic-styles/>
  <office:body>
    <office:text>
      <text:p>Docker Audit Report: nginx-alpine-trivy.json</text:p>
      <text:p>
Target: nginx:alpine (alpine 3.23.4)</text:p>
      <text:p>  [1] CVE-2026-4367 (MEDIUM): N/A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table="urn:oasis:names:tc:opendocument:xmlns:table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table="urn:oasis:names:tc:opendocument:xmlns:table:1.0" office:version="1.2">
  <office:meta>
    <meta:generator>ODFPY/1.4.1</meta:generator>
  </office:meta>
</office:document-meta>
</file>